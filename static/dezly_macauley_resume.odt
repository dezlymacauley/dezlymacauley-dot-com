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-left="none" fo:border-right="none" fo:border-top="none" fo:border-bottom="0.99pt solid #000000"/>
      <style:text-properties fo:font-size="16pt" style:font-size-asian="16pt" style:font-size-complex="16pt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padding="0.049cm" fo:border-left="none" fo:border-right="none" fo:border-top="none" fo:border-bottom="0.99pt solid #000000"/>
    </style:style>
    <style:style style:name="P4" style:family="paragraph" style:parent-style-name="Standard">
      <style:paragraph-properties fo:padding="0.049cm" fo:border-left="none" fo:border-right="none" fo:border-top="none" fo:border-bottom="0.99pt solid #000000"/>
      <style:text-properties fo:font-size="8pt" style:font-size-asian="7pt" style:font-size-complex="8pt"/>
    </style:style>
    <style:style style:name="P5" style:family="paragraph" style:parent-style-name="Standard">
      <style:text-properties fo:color="#7f009e" loext:opacity="100%" fo:font-weight="bold" style:font-weight-asian="bold" style:font-weight-complex="bold"/>
    </style:style>
    <style:style style:name="P6" style:family="paragraph" style:parent-style-name="Standard" style:list-style-name="List_20_1"/>
    <style:style style:name="P7" style:family="paragraph" style:parent-style-name="Standard" style:list-style-name="List_20_1">
      <style:text-properties officeooo:rsid="0023ca69" officeooo:paragraph-rsid="0023ca69"/>
    </style:style>
    <style:style style:name="P8" style:family="paragraph" style:parent-style-name="Standard" style:list-style-name="List_20_1">
      <style:text-properties officeooo:rsid="00258364" officeooo:paragraph-rsid="00258364"/>
    </style:style>
    <style:style style:name="P9" style:family="paragraph" style:parent-style-name="Standard">
      <style:paragraph-properties fo:padding="0.049cm" fo:border-left="none" fo:border-right="none" fo:border-top="none" fo:border-bottom="0.99pt solid #000000" style:join-border="false"/>
      <style:text-properties fo:font-size="8pt" style:font-size-asian="7pt" style:font-size-complex="8pt"/>
    </style:style>
    <style:style style:name="T1" style:family="text">
      <style:text-properties fo:color="#7f009e" loext:opacity="100%" fo:font-weight="bold" style:font-weight-asian="bold" style:font-weight-complex="bold"/>
    </style:style>
    <style:style style:name="T2" style:family="text">
      <style:text-properties fo:color="#7f009e" loext:opacity="100%" fo:font-weight="bold" officeooo:rsid="001f290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d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297_8077468"/><text:bookmark-start text:name="__DdeLink__1053_8077468"/><text:span text:style-name="T1">Dezly Macauley </text:span><text:span text:style-name="T2">| </text:span><text:span text:style-name="T3">Software Engineer</text:span></text:p>
      <text:p text:style-name="P2"/>
      <text:p text:style-name="P3"><text:span text:style-name="T3">Email:</text:span> <text:a xlink:type="simple" xlink:href="mailto:dezlymacauley@gmail.com" text:style-name="Internet_20_link" text:visited-style-name="Visited_20_Internet_20_Link">dezlymacauley@gmail.com</text:a> | <text:span text:style-name="T3">GitHub: </text:span><text:a xlink:type="simple" xlink:href="https://github.com/dezlymacauley" text:style-name="Internet_20_link" text:visited-style-name="Visited_20_Internet_20_Link">https://github.com/dezlymacauley</text:a></text:p>
      <text:p text:style-name="P4"/>
      <text:p text:style-name="P2"/>
      <text:p text:style-name="P5">Skill<text:bookmark-start text:name="__DdeLink__1039_8077468"/><text:bookmark-start text:name="__DdeLink__1036_8077468"/> Overview</text:p>
      <text:list text:style-name="List_20_1">
        <text:list-item>
          <text:p text:style-name="P6">Linux Proficiency:<text:tab/><text:tab/><text:tab/>Linux, Bash Scripting</text:p>
        </text:list-item>
        <text:list-item>
          <text:p text:style-name="P6">Compiled Non-GC Languages: <text:tab/>Rust, C</text:p>
        </text:list-item>
        <text:list-item>
          <text:p text:style-name="P6">Compiled GC Languages:<text:tab/><text:tab/>Go</text:p>
        </text:list-item>
        <text:list-item>
          <text:p text:style-name="P6"><text:span text:style-name="T4">Interpreted Languages</text:span>: <text:tab/><text:tab/>Python, TypeScript (Deno)</text:p>
        </text:list-item>
        <text:list-item>
          <text:p text:style-name="P6">Database Development: <text:tab/><text:tab/>PostgreSQL, SQLite<text:bookmark-end text:name="__DdeLink__1053_8077468"/><text:bookmark-end text:name="__DdeLink__1039_8077468"/><text:bookmark-end text:name="__DdeLink__1036_8077468"/></text:p>
        </text:list-item>
        <text:list-item>
          <text:p text:style-name="P7">Containers:<text:tab/><text:tab/><text:tab/><text:tab/>Docker</text:p>
        </text:list-item>
        <text:list-item>
          <text:p text:style-name="P8">Version Control:<text:tab/><text:tab/><text:tab/>Git</text:p>
        </text:list-item>
      </text:list>
      <text:p text:style-name="P9"/>
      <text:p text:style-name="Standard"><text:bookmark-end text:name="__DdeLink__1297_807746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19:19:08.476460764</meta:creation-date>
    <meta:generator>LibreOffice/26.2.4.2$Linux_X86_64 LibreOffice_project/620$Build-2</meta:generator>
    <dc:date>2026-07-22T15:04:08.739809763</dc:date>
    <meta:editing-duration>PT36M15S</meta:editing-duration>
    <meta:editing-cycles>12</meta:editing-cycles>
    <meta:document-statistic meta:table-count="0" meta:image-count="0" meta:object-count="0" meta:page-count="1" meta:paragraph-count="10" meta:word-count="47" meta:character-count="366" meta:non-whitespace-character-count="323"/>
  </office:meta>
</office:document-meta>
</file>