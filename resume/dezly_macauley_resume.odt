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9737a" officeooo:paragraph-rsid="001afac4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253029"/>
    </style:style>
    <style:style style:name="P3" style:family="paragraph" style:parent-style-name="Standard">
      <style:text-properties fo:font-size="12pt" fo:font-weight="bold" officeooo:rsid="001ca7d5" officeooo:paragraph-rsid="001ca7d5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officeooo:rsid="001ca7d5" officeooo:paragraph-rsid="001afac4" style:font-weight-asian="bold" style:font-weight-complex="bold"/>
    </style:style>
    <style:style style:name="P5" style:family="paragraph" style:parent-style-name="Standard">
      <style:text-properties officeooo:rsid="001a13c8" officeooo:paragraph-rsid="001afac4"/>
    </style:style>
    <style:style style:name="P6" style:family="paragraph" style:parent-style-name="Standard">
      <style:text-properties officeooo:paragraph-rsid="001afac4"/>
    </style:style>
    <style:style style:name="T1" style:family="text">
      <style:text-properties fo:color="#7f009e" loext:opacity="100%"/>
    </style:style>
    <style:style style:name="T2" style:family="text">
      <style:text-properties fo:color="#7f009e" loext:opacity="100%" fo:font-size="12pt" officeooo:rsid="001ed9dc" style:font-size-asian="12pt" style:font-size-complex="12pt"/>
    </style:style>
    <style:style style:name="T3" style:family="text">
      <style:text-properties fo:color="#7f009e" loext:opacity="100%" fo:font-size="12pt" officeooo:rsid="00253029" style:font-size-asian="12pt" style:font-size-complex="12pt"/>
    </style:style>
    <style:style style:name="T4" style:family="text">
      <style:text-properties fo:font-size="12pt" officeooo:rsid="00253029" style:font-size-asian="12pt" style:font-size-complex="12pt"/>
    </style:style>
    <style:style style:name="T5" style:family="text">
      <style:text-properties fo:color="#7f009e" loext:opacity="100%" fo:font-size="12pt" style:text-underline-style="solid" style:text-underline-width="auto" style:text-underline-color="font-color" officeooo:rsid="001ed9dc" style:font-size-asian="12pt" style:font-size-complex="12pt"/>
    </style:style>
    <style:style style:name="T6" style:family="text">
      <style:text-properties officeooo:rsid="001a13c8"/>
    </style:style>
    <style:style style:name="T7" style:family="text">
      <style:text-properties officeooo:rsid="001d0949"/>
    </style:style>
    <style:style style:name="T8" style:family="text">
      <style:text-properties fo:font-weight="normal" officeooo:rsid="001d55fc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7dd2" style:font-weight-asian="normal" style:font-weight-complex="normal"/>
    </style:style>
    <style:style style:name="T11" style:family="text">
      <style:text-properties fo:font-weight="bold" officeooo:rsid="001ca7d5" style:font-weight-asian="bold" style:font-weight-complex="bold"/>
    </style:style>
    <style:style style:name="T12" style:family="text">
      <style:text-properties fo:font-weight="bold" officeooo:rsid="001d0949" style:font-weight-asian="bold" style:font-weight-complex="bold"/>
    </style:style>
    <style:style style:name="T13" style:family="text">
      <style:text-properties fo:font-weight="bold" officeooo:rsid="001e7dd2" style:font-weight-asian="bold" style:font-weight-complex="bold"/>
    </style:style>
    <style:style style:name="T14" style:family="text">
      <style:text-properties officeooo:rsid="001e7dd2"/>
    </style:style>
    <style:style style:name="T15" style:family="text">
      <style:text-properties officeooo:rsid="001ed9dc"/>
    </style:style>
    <style:style style:name="T16" style:family="text">
      <style:text-properties officeooo:rsid="0023d1da"/>
    </style:style>
    <style:style style:name="T17" style:family="text">
      <style:text-properties officeooo:rsid="0022d5f3"/>
    </style:style>
    <style:style style:name="T18" style:family="text">
      <style:text-properties officeooo:rsid="0020e423"/>
    </style:style>
    <style:style style:name="T19" style:family="text">
      <style:text-properties fo:color="#7f009e" loext:opacity="100%" officeooo:rsid="0022d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725_1171223984"/><text:bookmark-start text:name="__DdeLink__228_1171223984"/><text:bookmark-start text:name="__DdeLink__292_1171223984"/><text:bookmark-start text:name="__DdeLink__341_1171223984"/>Dezly Macauley<text:line-break/><text:span text:style-name="T1">Rust Systems Programmer</text:span></text:p>
      <text:p text:style-name="P1"/>
      <text:p text:style-name="P2"><text:a xlink:type="simple" xlink:href="mailto:dezlymacauley@gmail.com" text:style-name="Internet_20_link" text:visited-style-name="Visited_20_Internet_20_Link"><text:span text:style-name="T2">dezlymacauley@gmail.co</text:span><text:span text:style-name="T3">m</text:span></text:a><text:span text:style-name="T4"> | </text:span><text:a xlink:type="simple" xlink:href="https://github.com/dezlymacauley/dezly-labs" text:style-name="Internet_20_link" text:visited-style-name="Visited_20_Internet_20_Link"><text:span text:style-name="T5">GitHub (Dezly Labs)</text:span></text:a><text:span text:style-name="T6"><text:line-break/></text:span></text:p>
      <text:p text:style-name="P3">Tech Stack <text:span text:style-name="T7">Overview</text:span><text:line-break/><text:span text:style-name="T8">Rust, </text:span><text:span text:style-name="T9">Docker, Postgres, </text:span><text:span text:style-name="T10">Bash Scripting</text:span></text:p>
      <text:p text:style-name="P4"/>
      <text:p text:style-name="P5"><text:span text:style-name="T11">Experience</text:span><text:line-break/><text:line-break/><text:bookmark-start text:name="__DdeLink__729_1171223984"/><text:span text:style-name="T11">Do</text:span><text:span text:style-name="T12">cker, </text:span><text:span text:style-name="T13">Postgres, and Bash Scripting</text:span></text:p>
      <text:p text:style-name="P6"><text:span text:style-name="T6">- </text:span><text:span text:style-name="T7">Containerized a Postgres database using Docker Compose, with strict </text:span><text:span text:style-name="T14">image tags, </text:span><text:span text:style-name="T7">port mappings, and named volumes for a reproducible environment.<text:line-break/>- </text:span><text:span text:style-name="T15">Created s</text:span><text:span text:style-name="T16">ix</text:span><text:span text:style-name="T15"> bash scripts </text:span><text:span text:style-name="T17">that use the Docker CLI,</text:span><text:span text:style-name="T15"> and </text:span><text:span text:style-name="T17">then </text:span><text:span text:style-name="T15">used </text:span><text:span text:style-name="T17">mise </text:span><text:span text:style-name="T18">(a Rust-powered tool version manager and task runner) to turn those bash scripts into </text:span><text:span text:style-name="T17">custom commands that are displayed </text:span><text:span text:style-name="T16">via a menu for</text:span><text:span text:style-name="T17"> easy <text:s/>onboarding </text:span><text:span text:style-name="T16">by running `mise tasks`</text:span><text:span text:style-name="T17">:<text:line-break/></text:span><text:a xlink:type="simple" xlink:href="https://github.com/dezlymacauley/dezly-labs/tree/main/docker-lab" text:style-name="Internet_20_link" text:visited-style-name="Visited_20_Internet_20_Link"><text:span text:style-name="T19">https://github.com/dezlymacauley/dezly-labs/tree/main/docker-lab</text:span></text:a><text:bookmark-end text:name="__DdeLink__725_1171223984"/><text:bookmark-end text:name="__DdeLink__341_1171223984"/><text:bookmark-end text:name="__DdeLink__292_1171223984"/><text:bookmark-end text:name="__DdeLink__228_1171223984"/><text:bookmark-end text:name="__DdeLink__729_117122398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13:17:16.543004056</meta:creation-date>
    <meta:generator>LibreOffice/26.2.4.2$Linux_X86_64 LibreOffice_project/620$Build-2</meta:generator>
    <meta:print-date>2026-07-02T13:22:36.225795054</meta:print-date>
    <meta:printed-by>PDF files</meta:printed-by>
    <dc:date>2026-07-03T16:05:38.413550017</dc:date>
    <meta:editing-duration>PT37M21S</meta:editing-duration>
    <meta:editing-cycles>15</meta:editing-cycles>
    <meta:document-statistic meta:table-count="0" meta:image-count="0" meta:object-count="0" meta:page-count="1" meta:paragraph-count="5" meta:word-count="89" meta:character-count="650" meta:non-whitespace-character-count="563"/>
  </office:meta>
</office:document-meta>
</file>