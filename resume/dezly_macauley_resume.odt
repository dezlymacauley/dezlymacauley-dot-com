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37a" officeooo:paragraph-rsid="00197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zly Macaule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7-02T13:17:16.543004056</meta:creation-date>
    <meta:generator>LibreOffice/26.2.4.2$Linux_X86_64 LibreOffice_project/620$Build-2</meta:generator>
    <meta:print-date>2026-07-02T13:22:36.225795054</meta:print-date>
    <meta:printed-by>PDF files</meta:printed-by>
    <dc:date>2026-07-02T13:34:12.450395033</dc:date>
    <meta:editing-duration>PT13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</office:meta>
</office:document-meta>
</file>