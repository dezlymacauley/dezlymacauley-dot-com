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37a" officeooo:paragraph-rsid="0019737a"/>
    </style:style>
    <style:style style:name="T1" style:family="text">
      <style:text-properties officeooo:rsid="001a1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zly Macauley<text:line-break/><text:line-break/><text:span text:style-name="T1">Dock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13:17:16.543004056</meta:creation-date>
    <meta:generator>LibreOffice/26.2.4.2$Linux_X86_64 LibreOffice_project/620$Build-2</meta:generator>
    <meta:print-date>2026-07-02T13:22:36.225795054</meta:print-date>
    <meta:printed-by>PDF files</meta:printed-by>
    <dc:date>2026-07-02T23:09:08.465481737</dc:date>
    <meta:editing-duration>PT57S</meta:editing-duration>
    <meta:editing-cycles>3</meta:editing-cycles>
    <meta:document-statistic meta:table-count="0" meta:image-count="0" meta:object-count="0" meta:page-count="1" meta:paragraph-count="1" meta:word-count="3" meta:character-count="22" meta:non-whitespace-character-count="19"/>
  </office:meta>
</office:document-meta>
</file>